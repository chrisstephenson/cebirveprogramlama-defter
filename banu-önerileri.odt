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margin-top="0cm" fo:margin-bottom="0.499cm" style:contextual-spacing="false" fo:text-indent="0cm" style:auto-text-indent="false" style:writing-mode="lr-tb"/>
    </style:style>
    <style:style style:name="P3"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4" style:family="paragraph" style:parent-style-name="Text_20_body" style:list-style-name="L1">
      <style:paragraph-properties fo:margin-top="0cm" fo:margin-bottom="0cm" style:contextual-spacing="false" style:writing-mode="lr-tb"/>
    </style:style>
    <style:style style:name="P5" style:family="paragraph" style:parent-style-name="Text_20_body" style:list-style-name="L1">
      <style:paragraph-properties style:writing-mode="lr-tb"/>
    </style:style>
    <style:style style:name="P6" style:family="paragraph" style:parent-style-name="Text_20_body" style:list-style-name="L1">
      <style:paragraph-properties fo:margin-left="0cm" fo:margin-right="0cm" fo:text-indent="0cm" style:auto-text-indent="false" style:writing-mode="lr-tb"/>
      <style:text-properties fo:language="tr" fo:country="TR"/>
    </style:style>
    <style:style style:name="P7" style:family="paragraph" style:parent-style-name="Text_20_body" style:list-style-name="L1">
      <style:paragraph-properties fo:margin-left="0cm" fo:margin-right="0cm" fo:margin-top="0cm" fo:margin-bottom="0cm" style:contextual-spacing="false" fo:line-height="115%" fo:text-indent="0cm" style:auto-text-indent="false" style:writing-mode="lr-tb"/>
    </style:style>
    <style:style style:name="P8" style:family="paragraph" style:parent-style-name="Text_20_body" style:list-style-name="L1">
      <style:paragraph-properties fo:margin-left="0cm" fo:margin-right="0cm" fo:text-indent="0cm" style:auto-text-indent="false" style:writing-mode="lr-tb"/>
    </style:style>
    <style:style style:name="P9" style:family="paragraph" style:parent-style-name="Text_20_body">
      <style:paragraph-properties fo:margin-left="0cm" fo:margin-right="0cm" fo:margin-top="0cm" fo:margin-bottom="0cm" style:contextual-spacing="false" fo:text-indent="0cm" style:auto-text-indent="false" style:writing-mode="lr-tb"/>
      <style:text-properties fo:color="#9d1811" loext:opacity="100%"/>
    </style:style>
    <style:style style:name="P10" style:family="paragraph" style:parent-style-name="Text_20_body">
      <style:paragraph-properties fo:margin-left="0cm" fo:margin-right="0cm" fo:margin-top="0cm" fo:margin-bottom="0cm" style:contextual-spacing="false" fo:text-indent="0cm" style:auto-text-indent="false" style:writing-mode="lr-tb"/>
      <style:text-properties fo:color="#9d1811" loext:opacity="100%" fo:font-weight="bold"/>
    </style:style>
    <style:style style:name="P11" style:family="paragraph" style:parent-style-name="Text_20_body">
      <style:paragraph-properties fo:margin-left="0cm" fo:margin-right="0cm" fo:text-indent="0cm" style:auto-text-indent="false" style:writing-mode="lr-tb"/>
      <style:text-properties fo:color="#9d1811" loext:opacity="100%" fo:font-weight="bold"/>
    </style:style>
    <style:style style:name="P12" style:family="paragraph" style:parent-style-name="Text_20_body">
      <style:paragraph-properties fo:margin-left="0cm" fo:margin-right="0cm" fo:margin-top="0cm" fo:margin-bottom="0cm" style:contextual-spacing="false" fo:text-indent="0cm" style:auto-text-indent="false" style:writing-mode="lr-tb"/>
      <style:text-properties fo:language="tr" fo:country="TR"/>
    </style:style>
    <style:style style:name="P13" style:family="paragraph" style:parent-style-name="Text_20_body">
      <style:paragraph-properties fo:margin-left="0cm" fo:margin-right="0cm" fo:margin-top="0cm" fo:margin-bottom="0cm" style:contextual-spacing="false" fo:text-indent="0cm" style:auto-text-indent="false" style:writing-mode="lr-tb"/>
    </style:style>
    <style:style style:name="P14" style:family="paragraph" style:parent-style-name="Text_20_body">
      <style:paragraph-properties fo:margin-left="0cm" fo:margin-right="0cm" fo:text-indent="0cm" style:auto-text-indent="false" style:writing-mode="lr-tb"/>
      <style:text-properties fo:language="tr" fo:country="TR"/>
    </style:style>
    <style:style style:name="P15" style:family="paragraph" style:parent-style-name="Text_20_body">
      <style:paragraph-properties fo:margin-left="0cm" fo:margin-right="0cm" fo:margin-top="0cm" fo:margin-bottom="0cm" style:contextual-spacing="false" fo:line-height="115%" fo:text-indent="0cm" style:auto-text-indent="false" style:writing-mode="lr-tb"/>
      <style:text-properties style:font-name="Arial" fo:font-size="10pt" fo:language="tr" fo:country="TR"/>
    </style:style>
    <style:style style:name="P16" style:family="paragraph" style:parent-style-name="Text_20_body">
      <style:paragraph-properties fo:margin-top="0cm" fo:margin-bottom="0cm" style:contextual-spacing="false" style:writing-mode="lr-tb"/>
    </style:style>
    <style:style style:name="P17" style:family="paragraph" style:parent-style-name="Text_20_body">
      <style:paragraph-properties fo:margin-left="0cm" fo:margin-right="0cm" fo:margin-top="0cm" fo:margin-bottom="0cm" style:contextual-spacing="false" fo:text-indent="0cm" style:auto-text-indent="false" style:writing-mode="lr-tb"/>
      <style:text-properties fo:color="#9d1811" loext:opacity="100%" fo:language="tr" fo:country="TR"/>
    </style:style>
    <style:style style:name="P18" style:family="paragraph" style:parent-style-name="Text_20_body">
      <style:paragraph-properties style:writing-mode="lr-tb"/>
    </style:style>
    <style:style style:name="P19" style:family="paragraph" style:parent-style-name="Text_20_body">
      <style:paragraph-properties fo:margin-left="0cm" fo:margin-right="0cm" fo:text-indent="0cm" style:auto-text-indent="false" style:writing-mode="lr-tb"/>
    </style:style>
    <style:style style:name="T1" style:family="text">
      <style:text-properties fo:font-style="italic"/>
    </style:style>
    <style:style style:name="T2" style:family="text">
      <style:text-properties fo:language="tr" fo:country="TR"/>
    </style:style>
    <style:style style:name="T3" style:family="text">
      <style:text-properties style:font-name="Arial" fo:font-size="10pt" fo:language="tr" fo:country="TR"/>
    </style:style>
    <style:style style:name="T4" style:family="text">
      <style:text-properties fo:font-variant="normal" fo:text-transform="none"/>
    </style:style>
    <style:style style:name="T5" style:family="text">
      <style:text-properties fo:font-weight="bold"/>
    </style:style>
    <style:style style:name="T6" style:family="text">
      <style:text-properties style:text-position="33% 80%"/>
    </style:style>
    <style:style style:name="T7" style:family="text">
      <style:text-properties fo:color="#9d1811" loext:opacity="100%" fo:font-weight="bold"/>
    </style:style>
    <style:style style:name="T8" style:family="text">
      <style:text-properties fo:color="#9d1811"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Merhaba,</text:p>
      <text:p text:style-name="P2"/>
      <text:list text:style-name="L1">
        <text:list-item>
          <text:p text:style-name="P3">Çalışma defterinin başında 2. sayfada bölüm adlarının yanlarına sayfa no. yazsak işe yarayabilir.</text:p>
        </text:list-item>
        <text:list-item>
          <text:p text:style-name="P4">Günlük alıştırmaların sayfa sonlarında yada her bölümün son sayfasındaki boşluklarda bir "Yaptıklarınızı saklayın !"  Mesajı faydalı olur </text:p>
        </text:list-item>
        <text:list-item>
          <text:p text:style-name="P4">BÖLÜM 3: Tanımlara girişte anahtar kelimelerden 1-2 cümle ile bahsedilebilir, özel bir anlamları olduğu, nerede nasıl kullanılacağı gibi,  o ana kadar öğrenilen anahtar kelimler o gün tahtanın kenarına yazılabilir. Örneğin define, cond, string=?, true, false, and, or ...</text:p>
        </text:list-item>
        <text:list-item>
          <text:p text:style-name="P4">fonksiyon  yazmaya başladıkları noktada (BÖLÜM 6 içnde) Parantez kullanımının nasıl olduğundan 1-2 cümle ile bahsedilmesi ileride bir çok parantez sorununu önleyebilir. Örneğin ok tuşlarıyla ilerlerken parantezlerin eşleştirildiğini belirtirsek bu işlerini kolaylaştırabilir. Parantezlerin neden kullanıldığı, içiçe parantezlerin kullanımına dair bir kaç örnek göstermek, içiçe yazılan bir kaç fonksiyonu içerden dışarıya doğru aşamalı yazmak anlaşılmasını kolaylaştırır. Aşağıya bir kaç örnek alıştırma ekledim, böylece hazır içiçe fonksiyon çağrılan ifadeleri gördüklerinde, onları değiştirince sonucun nasıl değiştiğini görerek anlamalarını sağlarsak kendileri daha kolay yazabilir.</text:p>
        </text:list-item>
        <text:list-item>
          <text:p text:style-name="P5">fonksiyon anlatırken söyle bir örnek anlaşılırlığı artırabilir: </text:p>
          <text:p text:style-name="P6">(define (f x) (+ x 1))    BUNUN cebirsel karşışığı/ifadesi : f(x)=x+1</text:p>
        </text:list-item>
        <text:list-item>
          <text:p text:style-name="P4">fonksiyonlar gösterilirken örnek verileceğinde ileride kullanılacak <text:span text:style-name="T1">image-width()</text:span>, <text:span text:style-name="T1">image-height()</text:span> vb fonksiyonların kullanımını örnek verirsek birkaç gün sonra kullanacakları fonksiyonlara hazırlık da olur.</text:p>
        </text:list-item>
        <text:list-item>
          <text:p text:style-name="P4">değerler ve tanımlarla, fonksiyonlarla ilgili aşağıya bazı alıştırma önerileri paylaşıyorum, özellikle fonksiyonlarda hazır yazılmış bazı ifadeleri anlamalarına yönelik alıştırmalar faydalı olur diye düşünüyorum</text:p>
        </text:list-item>
        <text:list-item>
          <text:p text:style-name="P7"><text:span text:style-name="T2">Veri yapıları ya da STRUCT öncesinde, </text:span><text:span text:style-name="T3">alıştırma olarak </text:span><text:span text:style-name="T2">içinde struct olmayacak şekilde </text:span><text:span text:style-name="T3">BAŞLANGIÇ VE BİTİŞ ekranlarına hazırlık olacak kod parçaları yazmaları istenebilir.</text:span></text:p>
        </text:list-item>
        <text:list-item>
          <text:p text:style-name="P4">Struct anlatırken bileşenlerin sıralamasının önemli olduğunu özellikle belirtmekte fayda var</text:p>
        </text:list-item>
        <text:list-item>
          <text:p text:style-name="P4">komponent yerine öğrencilerin daha kolay anlayabileceği "bileşen" kelimesinin kullanılmasını öneriyorum (sf. 50, 56, 68, 82, 83, 90, 91, 95, 96 vd) </text:p>
        </text:list-item>
        <text:list-item>
          <text:p text:style-name="P8"><text:span text:style-name="T4"> </text:span>KENDİ OYUNLARINDA SON SATIRLARDAKİ EVREN İŞLEMLERİNİN NE YAPTIĞININ ANLATILARAK OYUNDA ONLARDAN NELERİ PROGRAMLAMALARININ BEKLENDİĞİ/NASIL PROGRAMLAYACAKLARINI KISACA AÇIKLANMASI</text:p>
          <text:p text:style-name="P5">      (on-tick evren-güncelle (/ 1.0 FRAME-RATE))<text:line-break/>      (on-draw evren-çiz)<text:line-break/>      (on-key evren-tuş)<text:line-break/>      (on-mouse evren-fare)))</text:p>
        </text:list-item>
      </text:list>
      <text:p text:style-name="P9"><text:span text:style-name="T5">ALIŞTIRMALAR : </text:span>parantez içindeki  sayfa noları ile bu alıştırmaları hangi sayfalara eklenebileceği önerisini yazdım</text:p>
      <text:p text:style-name="P10"><text:soft-page-break/></text:p>
      <text:p text:style-name="P11">BÖLÜM 2: Önerilen sf: 8-10 arası </text:p>
      <text:p text:style-name="P12">(3*5 - 4)<text:span text:style-name="T6">2 </text:span>bu cebirsel ifadeyi koda çevirelim</text:p>
      <text:p text:style-name="P12"/>
      <text:p text:style-name="P12">(sqr (- (* 3 5) 4))</text:p>
      <text:p text:style-name="P12">(sqr (* 3 5) - 4)</text:p>
      <text:p text:style-name="P12">(sqr (- 4 (* 3 5)))</text:p>
      <text:p text:style-name="P12">((- (* 3 5) 4))sqr)</text:p>
      <text:p text:style-name="P13"/>
      <text:p text:style-name="P12"><text:span text:style-name="T7">BÖLÜM 3 </text:span><text:span text:style-name="T8">(sf.12) </text:span> Aşağıdaki değerlerin her binin veri türü nedir?</text:p>
      <text:p text:style-name="P12">42</text:p>
      <text:p text:style-name="P14">"Merhaba !"</text:p>
      <text:p text:style-name="P12">Aşağıdaki ifadelerin her birinin sonucunda hesaplanan değerin türü nedir?</text:p>
      <text:p text:style-name="P12">(/ (+ 7 2) 3)</text:p>
      <text:p text:style-name="P12">(star 500 "solid" "purple")</text:p>
      <text:p text:style-name="P12">(star (+ 1 3) "outline" "blue")</text:p>
      <text:p text:style-name="P15">(- (* 4 2) (+ 1 0))</text:p>
      <text:p text:style-name="P13"/>
      <text:p text:style-name="P13">Aşağıdaki her maddelerdekilerin bazıları "değer" bazıları ise "tür" gösteriyor. Farkı söyleyebilir misin?<text:line-break/>792.24<text:line-break/>String<text:line-break/>"Matematik Köyü"<text:line-break/>"91"<text:line-break/>Number<text:line-break/>Image<text:line-break/>102</text:p>
      <text:p text:style-name="P16"/>
      <text:p text:style-name="P17"><text:span text:style-name="T5">BÖLÜM 4 : </text:span>Fonksiyon bölümü başına sf 13 ile 14 arasına bir sayfa olarak eklenebilir</text:p>
      <text:p text:style-name="P14">Aşağıdaki yeni bir fonksiyona ait sözleşme</text:p>
      <text:p text:style-name="P12">; rectangle: sayı sayı metin metin -&gt; imaj</text:p>
      <text:p text:style-name="P12"/>
      <text:p text:style-name="P12">Bu fonksiyonun adı ne?</text:p>
      <text:p text:style-name="P12">Bu fonksiyonun kaç tane girdisi var?</text:p>
      <text:p text:style-name="P12">Girdilerin her birinin veri türü nedir?</text:p>
      <text:p text:style-name="P12">Bu fonksiyonun çıktısı hangi veri türünde?</text:p>
      <text:p text:style-name="P18"/>
      <text:p text:style-name="P12">Sizce aşağıdaki kodun çıktısı ne olacak?</text:p>
      <text:p text:style-name="P12">rectangle: </text:p>
      <text:p text:style-name="P12">(rectangle 100 50 "solid" "blue")</text:p>
      <text:p text:style-name="P13"/>
      <text:p text:style-name="P19">Aşağıdakilerin hangileri sözleşme tanımıdır? <text:line-break/><text:soft-page-break/><text:line-break/>; triangle : sayi metin metin -&gt; imaj<text:line-break/>(triangle 100 "outline" "blue")<text:line-break/>(square (+ 200 5) "solid" "red")<text:line-break/>; square : sayi  metin metin -&gt; imaj<text:line-break/><text:line-break/>Aşagıdaki ifadelerin her biri hatalı, kodlara bakarak neyin yanlış olduğunu bulabilir misin? Kodları etkileşimli pencereye yazıp nasıl bir hata mesajı verdiğine bak. Hata mesajı senin gördüğün hatayı mı işaret ediyor? <text:line-break/> <text:line-break/>(+ 4 "hi")<text:line-break/>("hi" + "mom")<text:line-break/>(* (+ 4 5) "pizza")<text:line-break/>(star "solid" "red" 40)<text:line-break/>(star "40" "solid" "red")<text:line-break/>(star 40 "red" "solid")<text:line-break/>(star 40 "sold" "yelow")<text:line-break/>(star (* 4 10) "blue")</text:p>
      <text:p text:style-name="P12">Nokta adlı bir fonksiyon yazalım, bir renk alsın ve çapı 15 büyüklüğünde içi verilen renkle boyanmış bir daire (içi dolu bir çember) çizsin/üretsin </text:p>
      <text:p text:style-name="P12">; Nokta : String -&gt; Image</text:p>
      <text:p text:style-name="P12">(ÖRNEK (Nokta   "red") (circle 15 "solid"  "red"))</text:p>
      <text:p text:style-name="P12">(ÖRNEK (Nokta "blue") (circle 15 "solid" "blue"))</text:p>
      <text:p text:style-name="P15">(define  (Nokta color) (circle 15 "solid"  color))</text:p>
      <text:p text:style-name="P16"/>
      <text:p text:style-name="P13"/>
      <text:p text:style-name="P13">Köyde görüşmek üzere,</text:p>
      <text:p text:style-name="P13">Banu</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7T00:43:02.665936777</meta:creation-date>
    <dc:title>default</dc:title>
    <meta:editing-duration>PT36S</meta:editing-duration>
    <meta:editing-cycles>2</meta:editing-cycles>
    <meta:generator>LibreOffice/25.2.4.3$Linux_X86_64 LibreOffice_project/520$Build-3</meta:generator>
    <meta:initial-creator>Barbara Stephenson</meta:initial-creator>
    <dc:date>2025-07-07T00:43:37.200872761</dc:date>
    <dc:creator>Barbara Stephenson</dc:creator>
    <meta:document-statistic meta:table-count="0" meta:image-count="0" meta:object-count="0" meta:page-count="3" meta:paragraph-count="48" meta:word-count="628" meta:character-count="4459" meta:non-whitespace-character-count="3841"/>
    <meta:template xlink:type="simple" xlink:actuate="onRequest" xlink:title="default" xlink:href="../../../../../../../../.config/libreoffice/4/user/template/default.ott" meta:date="2025-07-07T00:43:01.156721406"/>
  </office:meta>
</office:document-meta>
</file>